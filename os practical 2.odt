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32"/>
    <style:style style:name="P14" style:family="paragraph" style:parent-style-name="Text_20_body" style:list-style-name="L33"/>
    <style:style style:name="P15" style:family="paragraph" style:parent-style-name="Text_20_body" style:list-style-name="L34"/>
    <style:style style:name="P16" style:family="paragraph" style:parent-style-name="Text_20_body" style:list-style-name="L35"/>
    <style:style style:name="P17" style:family="paragraph" style:parent-style-name="Text_20_body" style:list-style-name="L36"/>
    <style:style style:name="P18" style:family="paragraph" style:parent-style-name="Text_20_body" style:list-style-name="L37"/>
    <style:style style:name="P19" style:family="paragraph" style:parent-style-name="Text_20_body" style:list-style-name="L38"/>
    <style:style style:name="P20" style:family="paragraph" style:parent-style-name="Text_20_body" style:list-style-name="L39"/>
    <style:style style:name="P21" style:family="paragraph" style:parent-style-name="Text_20_body" style:list-style-name="L40"/>
    <style:style style:name="P2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Heading_20_2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:-2</text:p>
      <text:p text:style-name="P1"/>
      <text:p text:style-name="P3">AIM:- Installation <text:s/>of <text:s/>LINUX OS.</text:p>
      <text:p text:style-name="P2"/>
      <text:h text:style-name="P23" text:outline-level="2"><text:span text:style-name="Strong_20_Emphasis"><text:span text:style-name="T1">STEP 1: Check system requirements</text:span></text:span></text:h>
      <text:p text:style-name="Text_20_body">Minimum (recommended):</text:p>
      <text:list xml:id="list1961317700955795001" text:style-name="L1">
        <text:list-item>
          <text:p text:style-name="P4">Processor: 64-bit</text:p>
        </text:list-item>
        <text:list-item>
          <text:p text:style-name="P4">RAM: 2 GB (4 GB better)</text:p>
        </text:list-item>
        <text:list-item>
          <text:p text:style-name="P4">Storage: 25 GB free space</text:p>
        </text:list-item>
        <text:list-item>
          <text:p text:style-name="P4">USB drive: 8 GB or more</text:p>
        </text:list-item>
        <text:list-item>
          <text:p text:style-name="P4">Internet connection (optional but helpful)</text:p>
        </text:list-item>
      </text:list>
      <text:h text:style-name="P23" text:outline-level="2"><text:span text:style-name="Strong_20_Emphasis"><text:span text:style-name="T1">STEP 2: Download Linux OS</text:span></text:span></text:h>
      <text:list xml:id="list182405842525131233" text:style-name="L2">
        <text:list-item>
          <text:p text:style-name="P5">Open a browser</text:p>
        </text:list-item>
        <text:list-item>
          <text:p text:style-name="P5">Go to the official Linux website<text:line-break/>Examples:</text:p>
          <text:list>
            <text:list-item>
              <text:p text:style-name="P5">Ubuntu → ubuntu.com</text:p>
            </text:list-item>
            <text:list-item>
              <text:p text:style-name="P5">Linux Mint → linuxmint.com</text:p>
            </text:list-item>
          </text:list>
        </text:list-item>
        <text:list-item>
          <text:p text:style-name="P5">Download the <text:span text:style-name="Strong_20_Emphasis">ISO file</text:span></text:p>
        </text:list-item>
      </text:list>
      <text:h text:style-name="Heading_20_2" text:outline-level="2"><text:span text:style-name="Strong_20_Emphasis"><text:span text:style-name="T1">STEP 3: Create a bootable USB</text:span></text:span></text:h>
      <text:h text:style-name="Heading_20_3" text:outline-level="3">On Windows</text:h>
      <text:list xml:id="list1091423041875985689" text:style-name="L3">
        <text:list-item>
          <text:p text:style-name="P6">Download <text:span text:style-name="Strong_20_Emphasis">Rufus</text:span></text:p>
        </text:list-item>
        <text:list-item>
          <text:p text:style-name="P6">Insert USB drive</text:p>
        </text:list-item>
        <text:list-item>
          <text:p text:style-name="P6">Open Rufus</text:p>
        </text:list-item>
        <text:list-item>
          <text:p text:style-name="P6">Select:</text:p>
          <text:list>
            <text:list-item>
              <text:p text:style-name="P6">Device → USB drive</text:p>
            </text:list-item>
            <text:list-item>
              <text:p text:style-name="P6">Boot selection → Linux ISO</text:p>
            </text:list-item>
            <text:list-item>
              <text:p text:style-name="P6">Partition scheme → GPT (UEFI) or MBR (Legacy)</text:p>
            </text:list-item>
          </text:list>
        </text:list-item>
        <text:list-item>
          <text:p text:style-name="P6">Click <text:span text:style-name="Strong_20_Emphasis">Start</text:span></text:p>
          <text:p text:style-name="P6"><text:span text:style-name="Strong_20_Emphasis">On macOS / Linux</text:span></text:p>
        </text:list-item>
      </text:list>
      <text:list xml:id="list6900787354095710624" text:style-name="L4">
        <text:list-item>
          <text:p text:style-name="P7">Use <text:span text:style-name="Strong_20_Emphasis">Balena Etcher</text:span></text:p>
        </text:list-item>
        <text:list-item>
          <text:p text:style-name="P7">Select ISO → Select USB → Flash</text:p>
        </text:list-item>
      </text:list>
      <text:h text:style-name="Heading_20_2" text:outline-level="2"><text:span text:style-name="Strong_20_Emphasis"><text:span text:style-name="T1">STEP 4: Change boot order</text:span></text:span></text:h>
      <text:list xml:id="list4723723264211867767" text:style-name="L5">
        <text:list-item>
          <text:p text:style-name="P8">Restart computer</text:p>
        </text:list-item>
        <text:list-item>
          <text:p text:style-name="P8">Press boot key:</text:p>
          <text:list>
            <text:list-item>
              <text:p text:style-name="P8"><text:soft-page-break/><text:span text:style-name="Source_20_Text">F2</text:span>, <text:span text:style-name="Source_20_Text">F10</text:span>, <text:span text:style-name="Source_20_Text">F12</text:span>, <text:span text:style-name="Source_20_Text">ESC</text:span>, or <text:span text:style-name="Source_20_Text">DEL</text:span></text:p>
            </text:list-item>
          </text:list>
        </text:list-item>
        <text:list-item>
          <text:p text:style-name="P8">Enter <text:span text:style-name="Strong_20_Emphasis">BIOS/UEFI</text:span></text:p>
        </text:list-item>
        <text:list-item>
          <text:p text:style-name="P8">Set <text:span text:style-name="Strong_20_Emphasis">USB drive as first boot device</text:span></text:p>
        </text:list-item>
        <text:list-item>
          <text:p text:style-name="P8">Save and Exit</text:p>
        </text:list-item>
      </text:list>
      <text:h text:style-name="Heading_20_2" text:outline-level="2"><text:span text:style-name="Strong_20_Emphasis"><text:span text:style-name="T1">STEP 4: Change boot order</text:span></text:span></text:h>
      <text:list xml:id="list2756690435019628144" text:style-name="L6">
        <text:list-item>
          <text:p text:style-name="P9">Restart computer</text:p>
        </text:list-item>
        <text:list-item>
          <text:p text:style-name="P9">Press boot key:</text:p>
          <text:list>
            <text:list-item>
              <text:p text:style-name="P9"><text:span text:style-name="Source_20_Text">F2</text:span>, <text:span text:style-name="Source_20_Text">F10</text:span>, <text:span text:style-name="Source_20_Text">F12</text:span>, <text:span text:style-name="Source_20_Text">ESC</text:span>, or <text:span text:style-name="Source_20_Text">DEL</text:span></text:p>
            </text:list-item>
          </text:list>
        </text:list-item>
        <text:list-item>
          <text:p text:style-name="P9">Enter <text:span text:style-name="Strong_20_Emphasis">BIOS/UEFI</text:span></text:p>
        </text:list-item>
        <text:list-item>
          <text:p text:style-name="P9">Set <text:span text:style-name="Strong_20_Emphasis">USB drive as first boot device</text:span></text:p>
        </text:list-item>
        <text:list-item>
          <text:p text:style-name="P9">Save and Exit</text:p>
        </text:list-item>
      </text:list>
      <text:h text:style-name="Heading_20_2" text:outline-level="2"><text:span text:style-name="Strong_20_Emphasis"><text:span text:style-name="T1">STEP 5: Boot Linux from USB</text:span></text:span></text:h>
      <text:list xml:id="list1445851850735677749" text:style-name="L7">
        <text:list-item>
          <text:p text:style-name="P10">System loads Linux installer</text:p>
        </text:list-item>
        <text:list-item>
          <text:p text:style-name="P10">Select:</text:p>
          <text:list>
            <text:list-item>
              <text:p text:style-name="P10"><text:span text:style-name="Strong_20_Emphasis">Try Linux</text:span> (optional)</text:p>
            </text:list-item>
            <text:list-item>
              <text:p text:style-name="P10"><text:span text:style-name="Strong_20_Emphasis">Install Linux</text:span></text:p>
            </text:list-item>
          </text:list>
        </text:list-item>
      </text:list>
      <text:h text:style-name="Heading_20_2" text:outline-level="2"><text:span text:style-name="Strong_20_Emphasis"><text:span text:style-name="T1">STEP 6: Language and keyboard</text:span></text:span></text:h>
      <text:list xml:id="list1799339877335277826" text:style-name="L8">
        <text:list-item>
          <text:p text:style-name="P11">Select language</text:p>
        </text:list-item>
        <text:list-item>
          <text:p text:style-name="P11">Select keyboard layout</text:p>
        </text:list-item>
        <text:list-item>
          <text:p text:style-name="P11">Click <text:span text:style-name="Strong_20_Emphasis">Continue</text:span></text:p>
        </text:list-item>
      </text:list>
      <text:h text:style-name="Heading_20_2" text:outline-level="2"><text:span text:style-name="Strong_20_Emphasis"><text:span text:style-name="T1">STEP 7: Updates &amp; software</text:span></text:span></text:h>
      <text:p text:style-name="Text_20_body">Choose:</text:p>
      <text:list xml:id="list556855031738598329" text:style-name="L9">
        <text:list-item>
          <text:p text:style-name="P12"><text:span text:style-name="Strong_20_Emphasis">Normal installation</text:span></text:p>
        </text:list-item>
        <text:list-item>
          <text:p text:style-name="P12"><text:span text:style-name="Strong_20_Emphasis">Download updates while installing</text:span></text:p>
        </text:list-item>
        <text:list-item>
          <text:p text:style-name="P12"><text:span text:style-name="Strong_20_Emphasis">Install third-party software</text:span> (recommended)</text:p>
          <text:p text:style-name="P12">Click <text:span text:style-name="Strong_20_Emphasis">Continue</text:span> </text:p>
        </text:list-item>
      </text:list>
      <text:h text:style-name="Heading_20_2" text:outline-level="2"><text:span text:style-name="Strong_20_Emphasis"><text:span text:style-name="T1">STEP 8: Installation type </text:span></text:span></text:h>
      <text:p text:style-name="Text_20_body">Choose ONE:</text:p>
      <text:h text:style-name="Heading_20_3" text:outline-level="3">Option 1: Erase disk and install Linux</text:h>
      <text:list xml:id="list7064398497820093104" text:style-name="L32">
        <text:list-item>
          <text:p text:style-name="P13">Deletes all data</text:p>
        </text:list-item>
        <text:list-item>
          <text:p text:style-name="P13">Best for fresh Linux installation</text:p>
        </text:list-item>
      </text:list>
      <text:h text:style-name="Heading_20_3" text:outline-level="3"><text:soft-page-break/>Option 2: Install Linux alongside Windows</text:h>
      <text:list xml:id="list4719460951696147261" text:style-name="L33">
        <text:list-item>
          <text:p text:style-name="P14">Dual boot system</text:p>
        </text:list-item>
      </text:list>
      <text:h text:style-name="Heading_20_3" text:outline-level="3">Option 3: Something else</text:h>
      <text:list xml:id="list1376198833613020023" text:style-name="L34">
        <text:list-item>
          <text:p text:style-name="P15">Manual partitioning (advanced)</text:p>
        </text:list-item>
      </text:list>
      <text:p text:style-name="Text_20_body">Select option → <text:span text:style-name="Strong_20_Emphasis">Install Now</text:span></text:p>
      <text:h text:style-name="Heading_20_2" text:outline-level="2"><text:span text:style-name="Strong_20_Emphasis"><text:span text:style-name="T1">STEP 9: Confirm disk changes</text:span></text:span></text:h>
      <text:list xml:id="list4565893846169222221" text:style-name="L35">
        <text:list-item>
          <text:p text:style-name="P16">Click <text:span text:style-name="Strong_20_Emphasis">Continue</text:span></text:p>
        </text:list-item>
        <text:list-item>
          <text:p text:style-name="P16">Choose your <text:span text:style-name="Strong_20_Emphasis">time zone</text:span></text:p>
        </text:list-item>
      </text:list>
      <text:h text:style-name="Heading_20_2" text:outline-level="2"><text:span text:style-name="Strong_20_Emphasis"><text:span text:style-name="T1">STEP 10: Create user account</text:span></text:span></text:h>
      <text:p text:style-name="Text_20_body">Enter:</text:p>
      <text:list xml:id="list8961600233868819126" text:style-name="L36">
        <text:list-item>
          <text:p text:style-name="P17">Name</text:p>
        </text:list-item>
        <text:list-item>
          <text:p text:style-name="P17">Computer name</text:p>
        </text:list-item>
      </text:list>
      <text:p text:style-name="Text_20_body"><text:span text:style-name="Strong_20_Emphasis">Username</text:span></text:p>
      <text:list xml:id="list1473602411092181458" text:style-name="L37">
        <text:list-item>
          <text:p text:style-name="P18">Password</text:p>
        </text:list-item>
        <text:list-item>
          <text:p text:style-name="P18">Choose auto-login or password login</text:p>
        </text:list-item>
      </text:list>
      <text:p text:style-name="Text_20_body">Click <text:span text:style-name="Strong_20_Emphasis">Continue</text:span></text:p>
      <text:h text:style-name="Heading_20_2" text:outline-level="2"><text:span text:style-name="Strong_20_Emphasis"><text:span text:style-name="T1">STEP 11: Installation process</text:span></text:span></text:h>
      <text:list xml:id="list6046556933642622462" text:style-name="L38">
        <text:list-item>
          <text:p text:style-name="P19">Files copy</text:p>
        </text:list-item>
        <text:list-item>
          <text:p text:style-name="P19">System installs</text:p>
        </text:list-item>
        <text:list-item>
          <text:p text:style-name="P19">Takes 10–20 minutes</text:p>
        </text:list-item>
      </text:list>
      <text:h text:style-name="Heading_20_2" text:outline-level="2"><text:span text:style-name="Strong_20_Emphasis"><text:span text:style-name="T1">STEP 12: Restart system</text:span></text:span></text:h>
      <text:list xml:id="list5531720324369073921" text:style-name="L39">
        <text:list-item>
          <text:p text:style-name="P20">Click <text:span text:style-name="Strong_20_Emphasis">Restart Now</text:span></text:p>
        </text:list-item>
        <text:list-item>
          <text:p text:style-name="P20">Remove USB when prompted</text:p>
        </text:list-item>
        <text:list-item>
          <text:p text:style-name="P20">Press Enter</text:p>
        </text:list-item>
      </text:list>
      <text:h text:style-name="Heading_20_2" text:outline-level="2"><text:span text:style-name="Strong_20_Emphasis"><text:span text:style-name="T1">STEP 13: First login</text:span></text:span></text:h>
      <text:list xml:id="list786069510731470488" text:style-name="L40">
        <text:list-item>
          <text:p text:style-name="P21">Login using username &amp; password</text:p>
        </text:list-item>
        <text:list-item>
          <text:p text:style-name="P21">Linux desktop appears </text:p>
        </text:list-item>
      </text:list>
      <text:p text:style-name="P22">STEP 14: <text:span text:style-name="T5">Installation complete </text:span></text:p>
      <text:p text:style-name="Text_20_body"><text:span text:style-name="Strong_20_Emphasis"/></text:p>
      <text:p text:style-name="Text_20_body"><text:span text:style-name="Strong_20_Emphasis"/></text:p>
      <text:p text:style-name="Text_20_body"/>
      <text:p text:style-name="Text_20_body"><text:soft-page-break/><text:span text:style-name="Strong_20_Emphasis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28T14:45:06.27</meta:creation-date>
    <meta:document-statistic meta:table-count="0" meta:image-count="0" meta:object-count="0" meta:page-count="4" meta:paragraph-count="90" meta:word-count="388" meta:character-count="2011"/>
    <dc:date>2026-01-28T15:25:19.85</dc:date>
    <meta:editing-duration>PT9M41S</meta:editing-duration>
    <meta:editing-cycles>1</meta:editing-cycles>
    <meta:generator>OpenOffice/4.1.5$Win32 OpenOffice.org_project/415m1$Build-9789</meta:generator>
  </office:meta>
</office:document-meta>
</file>